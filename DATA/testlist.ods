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n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2595" calcext:value-type="float">
            <text:p>57.02595</text:p>
          </table:table-cell>
          <table:table-cell office:value-type="float" office:value="9.74676" calcext:value-type="float">
            <text:p>9.74676</text:p>
          </table:table-cell>
          <table:table-cell office:value-type="float" office:value="1774357989959" calcext:value-type="float">
            <text:p>1774357989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02595" calcext:value-type="float">
            <text:p>57.02595</text:p>
          </table:table-cell>
          <table:table-cell office:value-type="float" office:value="9.74676" calcext:value-type="float">
            <text:p>9.74676</text:p>
          </table:table-cell>
          <table:table-cell office:value-type="float" office:value="1774358793181" calcext:value-type="float">
            <text:p>17743587931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0180391" calcext:value-type="float">
            <text:p>57.0180391</text:p>
          </table:table-cell>
          <table:table-cell office:value-type="float" office:value="9.7602773" calcext:value-type="float">
            <text:p>9.7602773</text:p>
          </table:table-cell>
          <table:table-cell office:value-type="float" office:value="1774360673800" calcext:value-type="float">
            <text:p>17743606738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0180391" calcext:value-type="float">
            <text:p>57.0180391</text:p>
          </table:table-cell>
          <table:table-cell office:value-type="float" office:value="9.7602773" calcext:value-type="float">
            <text:p>9.7602773</text:p>
          </table:table-cell>
          <table:table-cell office:value-type="float" office:value="1774362184787" calcext:value-type="float">
            <text:p>17743621847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0113244" calcext:value-type="float">
            <text:p>57.0113244</text:p>
          </table:table-cell>
          <table:table-cell office:value-type="float" office:value="9.7724898" calcext:value-type="float">
            <text:p>9.7724898</text:p>
          </table:table-cell>
          <table:table-cell office:value-type="float" office:value="1774364019979" calcext:value-type="float">
            <text:p>1774364019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0113269" calcext:value-type="float">
            <text:p>57.0113269</text:p>
          </table:table-cell>
          <table:table-cell office:value-type="float" office:value="9.772487" calcext:value-type="float">
            <text:p>9.772487</text:p>
          </table:table-cell>
          <table:table-cell office:value-type="float" office:value="1774365167081" calcext:value-type="float">
            <text:p>1774365167081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09:31:44.846916976</meta:creation-date>
    <dc:date>2026-03-25T09:36:22.443017491</dc:date>
    <meta:editing-duration>PT4M38S</meta:editing-duration>
    <meta:editing-cycles>1</meta:editing-cycles>
    <meta:document-statistic meta:table-count="1" meta:cell-count="35" meta:object-count="0"/>
    <meta:generator>LibreOffice/26.2.1.2$Linux_X86_64 LibreOffice_project/620$Build-2</meta:generator>
  </office:meta>
</office:document-meta>
</file>